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Symbol" svg:font-family="Symbol" style:font-adornments="Regular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List_20_1" style:list-style-name="WWNum1">
      <style:paragraph-properties fo:margin-top="0cm" fo:margin-bottom="0.071cm" style:contextual-spacing="true"/>
    </style:style>
    <style:style style:name="P2" style:family="paragraph" style:parent-style-name="Standard">
      <style:paragraph-properties fo:margin-top="0cm" fo:margin-bottom="0cm" style:contextual-spacing="false"/>
    </style:style>
    <style:style style:name="P3" style:family="paragraph" style:parent-style-name="Standard">
      <style:paragraph-properties fo:margin-top="0cm" fo:margin-bottom="0.141cm" style:contextual-spacing="false"/>
    </style:style>
    <style:style style:name="P4" style:family="paragraph" style:parent-style-name="Standard">
      <style:paragraph-properties fo:margin-top="0cm" fo:margin-bottom="0.071cm" style:contextual-spacing="false"/>
    </style:style>
    <style:style style:name="P5" style:family="paragraph" style:parent-style-name="Standard">
      <style:paragraph-properties fo:margin-top="0cm" fo:margin-bottom="0.071cm" style:contextual-spacing="false" fo:padding-left="0cm" fo:padding-right="0cm" fo:padding-top="0cm" fo:padding-bottom="0.035cm" fo:border-left="none" fo:border-right="none" fo:border-top="none" fo:border-bottom="0.99pt solid #3299cc"/>
    </style:style>
    <style:style style:name="P6" style:family="paragraph" style:parent-style-name="Standard">
      <style:paragraph-properties fo:margin-top="0.494cm" fo:margin-bottom="0.071cm" style:contextual-spacing="false" fo:padding-left="0cm" fo:padding-right="0cm" fo:padding-top="0cm" fo:padding-bottom="0.035cm" fo:border-left="none" fo:border-right="none" fo:border-top="none" fo:border-bottom="1.5pt solid #0f4c75"/>
    </style:style>
    <style:style style:name="P7" style:family="paragraph" style:parent-style-name="Standard">
      <style:paragraph-properties fo:margin-left="0.3cm" fo:margin-top="0cm" fo:margin-bottom="0.106cm" style:contextual-spacing="false"/>
    </style:style>
    <style:style style:name="P8" style:family="paragraph" style:parent-style-name="Standard">
      <style:paragraph-properties fo:margin-top="0.212cm" fo:margin-bottom="0cm" style:contextual-spacing="false"/>
    </style:style>
    <style:style style:name="T1" style:family="text">
      <style:text-properties fo:color="#0f4c75" loext:opacity="100%" style:font-name="Calibri" fo:font-size="22pt" fo:font-style="normal" fo:font-weight="bold" style:font-size-asian="22pt" style:font-style-asian="normal" style:font-weight-asian="bold"/>
    </style:style>
    <style:style style:name="T2" style:family="text">
      <style:text-properties fo:color="#0f4c75" loext:opacity="100%" style:font-name="Calibri" fo:font-size="12pt" fo:font-style="normal" fo:font-weight="bold" style:font-size-asian="12pt" style:font-style-asian="normal" style:font-weight-asian="bold"/>
    </style:style>
    <style:style style:name="T3" style:family="text">
      <style:text-properties fo:color="#0f4c75" loext:opacity="100%" style:font-name="Calibri" fo:font-size="10pt" fo:font-style="normal" fo:font-weight="bold" style:font-size-asian="10pt" style:font-style-asian="normal" style:font-weight-asian="bold"/>
    </style:style>
    <style:style style:name="T4" style:family="text">
      <style:text-properties fo:color="#3299cc" loext:opacity="100%" style:font-name="Calibri" fo:font-size="12pt" fo:font-style="normal" fo:font-weight="bold" style:font-size-asian="12pt" style:font-style-asian="normal" style:font-weight-asian="bold"/>
    </style:style>
    <style:style style:name="T5" style:family="text">
      <style:text-properties fo:color="#3299cc" loext:opacity="100%" style:font-name="Calibri" fo:font-size="10pt" fo:font-style="normal" fo:font-weight="bold" style:font-size-asian="10pt" style:font-style-asian="normal" style:font-weight-asian="bold"/>
    </style:style>
    <style:style style:name="T6" style:family="text">
      <style:text-properties fo:color="#3299cc" loext:opacity="100%" style:font-name="Calibri" fo:font-size="11pt" fo:font-style="normal" fo:font-weight="bold" style:font-size-asian="11pt" style:font-style-asian="normal" style:font-weight-asian="bold"/>
    </style:style>
    <style:style style:name="T7" style:family="text">
      <style:text-properties fo:color="#556b7b" loext:opacity="100%" style:font-name="Calibri" fo:font-size="9pt" fo:font-style="normal" fo:font-weight="normal" style:font-size-asian="9pt" style:font-style-asian="normal" style:font-weight-asian="normal"/>
    </style:style>
    <style:style style:name="T8" style:family="text">
      <style:text-properties fo:color="#556b7b" loext:opacity="100%" style:font-name="Calibri" fo:font-size="9pt" fo:font-style="italic" fo:font-weight="normal" style:font-size-asian="9pt" style:font-style-asian="italic" style:font-weight-asian="normal"/>
    </style:style>
    <style:style style:name="T9" style:family="text">
      <style:text-properties fo:color="#556b7b" loext:opacity="100%" style:font-name="Calibri" fo:font-size="10pt" fo:font-style="italic" fo:font-weight="normal" style:font-size-asian="10pt" style:font-style-asian="italic" style:font-weight-asian="normal"/>
    </style:style>
    <style:style style:name="T10" style:family="text">
      <style:text-properties fo:color="#556b7b" loext:opacity="100%" style:font-name="Calibri" fo:font-size="10pt" fo:font-style="normal" fo:font-weight="normal" style:font-size-asian="10pt" style:font-style-asian="normal" style:font-weight-asian="normal"/>
    </style:style>
    <style:style style:name="T11" style:family="text">
      <style:text-properties fo:color="#90a4ae" loext:opacity="100%" style:font-name="Calibri" fo:font-size="9pt" fo:font-style="normal" fo:font-weight="normal" style:font-size-asian="9pt" style:font-style-asian="normal" style:font-weight-asian="normal"/>
    </style:style>
    <style:style style:name="T12" style:family="text">
      <style:text-properties fo:color="#222b36" loext:opacity="100%" style:font-name="Calibri" fo:font-size="10pt" fo:font-style="normal" fo:font-weight="normal" style:font-size-asian="10pt" style:font-style-asian="normal" style:font-weight-asian="normal"/>
    </style:style>
    <style:style style:name="T13" style:family="text">
      <style:text-properties fo:color="#222b36" loext:opacity="100%" style:font-name="Calibri" fo:font-size="10pt" fo:font-style="normal" fo:font-weight="bold" style:font-size-asian="10pt" style:font-style-asian="normal" style:font-weight-asian="bold"/>
    </style:style>
    <style:style style:name="T14" style:family="text">
      <style:text-properties fo:color="#222b36" loext:opacity="100%" style:font-name="Calibri" fo:font-size="11pt" fo:font-style="normal" fo:font-weight="bold" style:font-size-asian="11pt" style:font-style-asian="normal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MAHASALOTRA Toandromananjara</text:span></text:p>
      <text:p text:style-name="P3"><text:span text:style-name="T4">Développeur Full-Stack JS/TS <text:s/>| <text:s/>AI Engineer</text:span></text:p>
      <text:p text:style-name="P4"><text:span text:style-name="T7">mahasalotra@gmail.com</text:span><text:span text:style-name="T11"> <text:s text:c="2"/>| <text:s text:c="2"/></text:span><text:span text:style-name="T7">+261 34 03 121 63</text:span><text:span text:style-name="T11"> <text:s text:c="2"/>| <text:s text:c="2"/></text:span><text:span text:style-name="T7">📍 Antananarivo, Madagascar</text:span></text:p>
      <text:p text:style-name="P4"><text:span text:style-name="T7">🌐 toandro-portfolio.netlify.app</text:span><text:span text:style-name="T11"> <text:s text:c="2"/>| <text:s text:c="2"/></text:span><text:span text:style-name="T7">💼 linkedin.com/in/toandromananjara-mahasalotra</text:span><text:span text:style-name="T11"> <text:s text:c="2"/>| <text:s text:c="2"/></text:span><text:span text:style-name="T7">💻 github.com/ToandroMananjara</text:span></text:p>
      <text:p text:style-name="P5"/>
      <text:p text:style-name="P6"><text:span text:style-name="T2">PROFIL PROFESSIONNEL</text:span></text:p>
      <text:p text:style-name="P3"><text:span text:style-name="T12">Développeur Full-Stack JavaScript/TypeScript et AI Engineer, je conçois des produits web et mobiles modernes — du frontend React/Next.js aux APIs NestJS/FastAPI — et j'intègre de plus en plus de fonctionnalités IA en production (LLMs, RAG, voix/TTS, automatisation). Habitué aux environnements production et au travail collaboratif, j'aime livrer du code maintenable, performant et soigné — pensé pour la prochaine personne qui devra le maintenir.</text:span></text:p>
      <text:p text:style-name="P6"><text:span text:style-name="T2">DOMAINES D'EXPERTISE</text:span></text:p>
      <text:p text:style-name="P7"><text:span text:style-name="T5">▸ <text:s/></text:span><text:span text:style-name="T3">Frontend Engineering — </text:span><text:span text:style-name="T12">Interfaces React/Next.js pixel-perfect, accessibles et performantes. Composants réutilisables, animations soignées.</text:span></text:p>
      <text:p text:style-name="P7"><text:span text:style-name="T5">▸ <text:s/></text:span><text:span text:style-name="T3">Backend &amp; APIs — </text:span><text:span text:style-name="T12">Services NestJS / Node.js / FastAPI fiables — modèles de données limpides, authentification, déploiements prévisibles.</text:span></text:p>
      <text:p text:style-name="P7"><text:span text:style-name="T5">▸ <text:s/></text:span><text:span text:style-name="T3">Mobile Development — </text:span><text:span text:style-name="T12">Apps React Native / Expo cross-platform iOS &amp; Android, expérience cohérente, navigation fluide.</text:span></text:p>
      <text:p text:style-name="P7"><text:span text:style-name="T5">▸ <text:s/></text:span><text:span text:style-name="T3">AI Engineering — </text:span><text:span text:style-name="T12">Features LLM qui passent en prod : retrieval (RAG), prompts calibrés, agents et expériences vocales (ElevenLabs, Trigger.dev).</text:span></text:p>
      <text:p text:style-name="P6"><text:span text:style-name="T2">EXPÉRIENCE PROFESSIONNELLE</text:span></text:p>
      <text:p text:style-name="P8"><text:span text:style-name="T14">Développeur Full-Stack &amp; AI Engineer</text:span><text:span text:style-name="T6"> <text:s/>• <text:s/>Redsmite</text:span><text:span text:style-name="T9"> <text:s/>(Freelance)</text:span></text:p>
      <text:p text:style-name="P4"><text:span text:style-name="T8">2026 — Aujourd'hui <text:s/>| <text:s/>Madagascar / Remote</text:span></text:p>
      <text:list text:style-name="WWNum1">
        <text:list-item>
          <text:p text:style-name="P1"><text:span text:style-name="T12">Consultant sur des missions full-stack et IA pour différents clients.</text:span></text:p>
        </text:list-item>
        <text:list-item>
          <text:p text:style-name="P1"><text:span text:style-name="T12">Intégration de fonctionnalités IA en production : LLMs, voix / TTS (ElevenLabs), workflows d'automatisation (Trigger.dev).</text:span></text:p>
        </text:list-item>
        <text:list-item>
          <text:p text:style-name="P1"><text:span text:style-name="T12">Stack moderne : Next.js, TypeScript, FastAPI, Supabase — focus mise en production et fiabilité.</text:span></text:p>
        </text:list-item>
      </text:list>
      <text:p text:style-name="P8"><text:span text:style-name="T14">Développeur Full-Stack</text:span><text:span text:style-name="T6"> <text:s/>• <text:s/>Freelance</text:span><text:span text:style-name="T9"> <text:s/>(Freelance)</text:span></text:p>
      <text:p text:style-name="P4"><text:span text:style-name="T8">Juin 2025 — Aujourd'hui <text:s/>| <text:s/>Remote</text:span></text:p>
      <text:list text:continue-numbering="true" text:style-name="WWNum1">
        <text:list-item>
          <text:p text:style-name="P1"><text:span text:style-name="T12">Conception d'applications web complètes en Next.js, NestJS, TypeScript et PostgreSQL.</text:span></text:p>
        </text:list-item>
        <text:list-item>
          <text:p text:style-name="P1"><text:span text:style-name="T12">Réécriture complète d'un backend en NestJS avec architecture modulaire et APIs REST.</text:span></text:p>
        </text:list-item>
        <text:list-item>
          <text:p text:style-name="P1"><text:span text:style-name="T12">Refactorisation, amélioration de la qualité du code, nouvelles fonctionnalités frontend &amp; backend.</text:span></text:p>
        </text:list-item>
        <text:list-item>
          <text:p text:style-name="P1"><text:span text:style-name="T12">Modélisation et maintenance de bases PostgreSQL, déploiement VPS (Docker + Nginx).</text:span></text:p>
        </text:list-item>
      </text:list>
      <text:p text:style-name="P8"><text:span text:style-name="T14">Développeur Front-End</text:span><text:span text:style-name="T6"> <text:s/>• <text:s/>Freelance</text:span><text:span text:style-name="T9"> <text:s/>(Freelance)</text:span></text:p>
      <text:p text:style-name="P4"><text:span text:style-name="T8">Août 2025 <text:s/>| <text:s/>Remote</text:span></text:p>
      <text:list text:continue-numbering="true" text:style-name="WWNum1">
        <text:list-item>
          <text:p text:style-name="P1"><text:span text:style-name="T12">Conception d'une application web innovante intégrant l'IA pour l'industrie musicale.</text:span></text:p>
        </text:list-item>
        <text:list-item>
          <text:p text:style-name="P1"><text:span text:style-name="T12">Interface utilisateur dynamique et responsive en React et TypeScript.</text:span></text:p>
        </text:list-item>
      </text:list>
      <text:p text:style-name="P8"><text:span text:style-name="T14">Développeur Mobile</text:span><text:span text:style-name="T6"> <text:s/>• <text:s/>Paika Sarl</text:span><text:span text:style-name="T9"> <text:s/>(Stage)</text:span></text:p>
      <text:p text:style-name="P4"><text:span text:style-name="T8">Juillet — Août 2025 <text:s/>| <text:s/>Madagascar</text:span></text:p>
      <text:list text:continue-numbering="true" text:style-name="WWNum1">
        <text:list-item>
          <text:p text:style-name="P1"><text:span text:style-name="T12">Développement d'une application mobile pour food trucks en React Native, NestJS, TypeScript et Zustand.</text:span></text:p>
        </text:list-item>
        <text:list-item>
          <text:p text:style-name="P1"><text:span text:style-name="T12">Implémentation complète : catalogue produits, système de commandes, intégration paiement.</text:span></text:p>
        </text:list-item>
        <text:list-item>
          <text:p text:style-name="P1"><text:span text:style-name="T12">Modélisation PostgreSQL, livraison de features en Agile Scrum, frontend/backend et tests.</text:span></text:p>
        </text:list-item>
      </text:list>
      <text:p text:style-name="P8"><text:soft-page-break/><text:span text:style-name="T14">Développeur Web</text:span><text:span text:style-name="T6"> <text:s/>• <text:s/>Kinga IT</text:span><text:span text:style-name="T9"> <text:s/></text:span></text:p>
      <text:p text:style-name="P4"><text:span text:style-name="T8">Mars — Mai 2025 <text:s/>| <text:s/>Madagascar</text:span></text:p>
      <text:list text:continue-numbering="true" text:style-name="WWNum1">
        <text:list-item>
          <text:p text:style-name="P1"><text:span text:style-name="T12">Contribution full-stack en React, NestJS, TypeScript, MongoDB et PostgreSQL.</text:span></text:p>
        </text:list-item>
        <text:list-item>
          <text:p text:style-name="P1"><text:span text:style-name="T12">Intégration de nouvelles fonctionnalités frontend &amp; backend, en équipe Agile.</text:span></text:p>
        </text:list-item>
        <text:list-item>
          <text:p text:style-name="P1"><text:span text:style-name="T12">Modélisation, requêtes et optimisation BDD ; bonnes pratiques Git, code review, CI/CD.</text:span></text:p>
        </text:list-item>
      </text:list>
      <text:p text:style-name="P6"><text:span text:style-name="T2">PROJETS SÉLECTIONNÉS</text:span></text:p>
      <text:p text:style-name="P4"><text:span text:style-name="T5">▸ <text:s/></text:span><text:span text:style-name="T13">Plateforme de Statistiques Football — </text:span><text:span text:style-name="T12">Plateforme full-stack agrégeant des stats foot en direct — frontend React typé, backend PHP MVC, MySQL.</text:span><text:span text:style-name="T8"> <text:s/>[React, TypeScript, PHP, MVC, MySQL]</text:span></text:p>
      <text:p text:style-name="P4"><text:span text:style-name="T5">▸ <text:s/></text:span><text:span text:style-name="T13">Varotra — App E-commerce mobile — </text:span><text:span text:style-name="T12">App mobile e-commerce cross-platform en React Native, Expo et TypeScript.</text:span><text:span text:style-name="T8"> <text:s/>[React Native, Expo, TypeScript]</text:span></text:p>
      <text:p text:style-name="P4"><text:span text:style-name="T5">▸ <text:s/></text:span><text:span text:style-name="T13">Watch Store — </text:span><text:span text:style-name="T12">Front-end e-commerce pour un catalogue de montres de luxe.</text:span><text:span text:style-name="T8"> <text:s/>[React, CSS3]</text:span></text:p>
      <text:p text:style-name="P4"><text:span text:style-name="T5">▸ <text:s/></text:span><text:span text:style-name="T13">Portfolio personnel — </text:span><text:span text:style-name="T12">Portfolio interactif multilingue (FR/EN) avec animations et particles background.</text:span><text:span text:style-name="T8"> <text:s/>[React, Vite, Tailwind CSS, i18n]</text:span></text:p>
      <text:p text:style-name="P6"><text:span text:style-name="T2">COMPÉTENCES TECHNIQUES</text:span></text:p>
      <text:p text:style-name="P4"><text:span text:style-name="T3">Frontend : </text:span><text:span text:style-name="T12">React.js, Next.js, React Native, TypeScript, Tailwind CSS, Material UI, Bootstrap, Redux Toolkit, Zustand, i18n</text:span></text:p>
      <text:p text:style-name="P4"><text:span text:style-name="T3">Backend : </text:span><text:span text:style-name="T12">Node.js, NestJS, Express.js, FastAPI, APIs REST, Prisma, JWT</text:span></text:p>
      <text:p text:style-name="P4"><text:span text:style-name="T3">Bases de données : </text:span><text:span text:style-name="T12">PostgreSQL, MySQL, MongoDB, Supabase</text:span></text:p>
      <text:p text:style-name="P4"><text:span text:style-name="T3">IA &amp; Automatisation : </text:span><text:span text:style-name="T12">OpenAI, Anthropic Claude, Gemini, LangChain, RAG / Vector DB, Prompt Engineering, ElevenLabs (TTS), Trigger.dev</text:span></text:p>
      <text:p text:style-name="P4"><text:span text:style-name="T3">Langages : </text:span><text:span text:style-name="T12">JavaScript (ES6+), TypeScript, Python, Java, C, C++, PHP</text:span></text:p>
      <text:p text:style-name="P4"><text:span text:style-name="T3">DevOps &amp; Outils : </text:span><text:span text:style-name="T12">Git, GitHub, GitHub Actions, Docker, Nginx, CI/CD, Linux, VPS</text:span></text:p>
      <text:p text:style-name="P4"><text:span text:style-name="T3">Tests / QA : </text:span><text:span text:style-name="T12">Jest</text:span></text:p>
      <text:p text:style-name="P4"><text:span text:style-name="T3">Méthodologies : </text:span><text:span text:style-name="T12">Agile, Scrum, Code Review, Clean Code</text:span></text:p>
      <text:p text:style-name="P6"><text:span text:style-name="T2">FORMATION</text:span></text:p>
      <text:p text:style-name="P4"><text:span text:style-name="T5">▸ <text:s/></text:span><text:span text:style-name="T13">Master 2 — MISA (Informatique)</text:span><text:span text:style-name="T8"> <text:s/>— <text:s/>Université d'Antananarivo <text:s/>| <text:s/>2025 — 2026 (en cours)</text:span></text:p>
      <text:p text:style-name="P4"><text:span text:style-name="T5">▸ <text:s/></text:span><text:span text:style-name="T13">Master 1 — MISA (Informatique)</text:span><text:span text:style-name="T8"> <text:s/>— <text:s/>Université d'Antananarivo <text:s/>| <text:s/>2024 — 2025 (validé)</text:span></text:p>
      <text:p text:style-name="P4"><text:span text:style-name="T5">▸ <text:s/></text:span><text:span text:style-name="T13">Licence — MISA (Informatique)</text:span><text:span text:style-name="T8"> <text:s/>— <text:s/>Université d'Antananarivo <text:s/>| <text:s/>2023 — 2024 (diplômé)</text:span></text:p>
      <text:p text:style-name="P4"><text:span text:style-name="T5">▸ <text:s/></text:span><text:span text:style-name="T13">Formation Full-Stack Web</text:span><text:span text:style-name="T8"> <text:s/>— <text:s/>Digital Training Center <text:s/>| <text:s/>2023</text:span></text:p>
      <text:p text:style-name="P4"><text:span text:style-name="T5">▸ <text:s/></text:span><text:span text:style-name="T13">Baccalauréat Scientifique (Série C)</text:span><text:span text:style-name="T8"> <text:s/>— <text:s/>Lycée Nanisana <text:s/>| <text:s/>2018</text:span></text:p>
      <text:p text:style-name="P6"><text:span text:style-name="T2">LANGUES</text:span></text:p>
      <text:p text:style-name="P4"><text:span text:style-name="T5">▸ <text:s/></text:span><text:span text:style-name="T13">Malagasy — </text:span><text:span text:style-name="T10">Langue maternelle</text:span></text:p>
      <text:p text:style-name="P4"><text:span text:style-name="T5">▸ <text:s/></text:span><text:span text:style-name="T13">Français — </text:span><text:span text:style-name="T10">Courant (B2)</text:span></text:p>
      <text:p text:style-name="P4"><text:span text:style-name="T5">▸ <text:s/></text:span><text:span text:style-name="T13">Anglais — </text:span><text:span text:style-name="T10">Technique / Lecture (B1)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Symbol" svg:font-family="Symbol" style:font-adornments="Regular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  <style:text-properties style:font-name="Calibri" fo:font-family="Calibri" style:font-family-generic="roman" style:font-pitch="variable" fo:font-size="10pt" style:font-size-asian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cm" fo:margin-bottom="0.212cm" style:contextual-spacing="false"/>
    </style:style>
    <style:style style:name="List" style:family="paragraph" style:parent-style-name="Standard" style:class="list">
      <style:paragraph-properties fo:margin-left="0.635cm" fo:margin-top="0cm" fo:margin-bottom="0.353cm" style:contextual-spacing="true" fo:text-indent="-0.635cm" style:auto-text-indent="false"/>
    </style:style>
    <style:style style:name="Caption" style:family="paragraph" style:parent-style-name="Standard" style:next-style-name="Standard" style:class="extra">
      <style:paragraph-properties fo:line-height="100%"/>
      <style:text-properties fo:color="#4f81bd" loext:opacity="100%" fo:font-size="9pt" fo:font-weight="bold" style:font-size-asian="9pt" style:font-weight-asian="bold" style:font-size-complex="9pt" style:font-weight-complex="bold">
        <loext:char-complex-color loext:theme-type="accent1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847cm" fo:margin-bottom="0cm" style:contextual-spacing="false" fo:keep-together="always" fo:keep-with-next="always"/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text">
      <style:paragraph-properties fo:margin-top="0.353cm" fo:margin-bottom="0cm" style:contextual-spacing="false" fo:keep-together="always" fo:keep-with-next="always"/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text">
      <style:paragraph-properties fo:margin-top="0.353cm" fo:margin-bottom="0cm" style:contextual-spacing="false" fo:keep-together="always" fo:keep-with-next="always"/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text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text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No_20_Spacing" style:display-name="No Spacing" style:family="paragraph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Title" style:family="paragraph" style:parent-style-name="Standard" style:next-style-name="Standard" loext:linked-style-name="Title_20_Char" style:class="chapter">
      <style:paragraph-properties fo:margin-top="0cm" fo:margin-bottom="0.529cm" style:contextual-spacing="true" fo:line-height="100%" fo:padding-left="0cm" fo:padding-right="0cm" fo:padding-top="0cm" fo:padding-bottom="0.141cm" fo:border-left="none" fo:border-right="none" fo:border-top="none" fo:border-bottom="0.99pt solid #4f81bd"/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" style:family="paragraph" style:parent-style-name="Standard" style:next-style-name="Standard" loext:linked-style-name="Subtitle_20_Char" style:class="chapter">
      <style:text-properties fo:color="#4f81bd" loext:opacity="100%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353cm" style:contextual-spacing="true"/>
    </style:style>
    <style:style style:name="Body_20_Text_20_2" style:display-name="Body Text 2" style:family="paragraph" style:parent-style-name="Standard" loext:linked-style-name="Body_20_Text_20_2_20_Char">
      <style:paragraph-properties fo:margin-top="0cm" fo:margin-bottom="0.212cm" style:contextual-spacing="false" fo:line-height="200%"/>
    </style:style>
    <style:style style:name="Body_20_Text_20_3" style:display-name="Body Text 3" style:family="paragraph" style:parent-style-name="Standard" loext:linked-style-name="Body_20_Text_20_3_20_Char">
      <style:paragraph-properties fo:margin-top="0cm" fo:margin-bottom="0.212cm" style:contextual-spacing="false"/>
      <style:text-properties fo:font-size="8pt" style:font-size-asian="8pt" style:font-size-complex="8pt"/>
    </style:style>
    <style:style style:name="List_20_2_20__28_WW_29_" style:display-name="List 2 (WW)" style:family="paragraph" style:parent-style-name="Standard">
      <style:paragraph-properties fo:margin-left="1.27cm" fo:margin-top="0cm" fo:margin-bottom="0.353cm" style:contextual-spacing="true" fo:text-indent="-0.635cm" style:auto-text-indent="false"/>
    </style:style>
    <style:style style:name="List_20_3_20__28_WW_29_" style:display-name="List 3 (WW)" style:family="paragraph" style:parent-style-name="Standard">
      <style:paragraph-properties fo:margin-left="1.905cm" fo:margin-top="0cm" fo:margin-bottom="0.353cm" style:contextual-spacing="true" fo:text-indent="-0.635cm" style:auto-text-indent="false"/>
    </style:style>
    <style:style style:name="List_20_1" style:display-name="List 1" style:family="paragraph" style:parent-style-name="Standard" style:list-style-name="WWNum1" style:class="list">
      <style:paragraph-properties fo:margin-top="0cm" fo:margin-bottom="0.353cm" style:contextual-spacing="true"/>
    </style:style>
    <style:style style:name="List_20_2" style:display-name="List 2" style:family="paragraph" style:parent-style-name="Standard" style:list-style-name="WWNum2" style:class="list">
      <style:paragraph-properties fo:margin-top="0cm" fo:margin-bottom="0.353cm" style:contextual-spacing="true"/>
    </style:style>
    <style:style style:name="List_20_3" style:display-name="List 3" style:family="paragraph" style:parent-style-name="Standard" style:list-style-name="WWNum3" style:class="list">
      <style:paragraph-properties fo:margin-top="0cm" fo:margin-bottom="0.353cm" style:contextual-spacing="true"/>
    </style:style>
    <style:style style:name="Numbering_20_1" style:display-name="Numbering 1" style:family="paragraph" style:parent-style-name="Standard" style:list-style-name="WWNum5" style:class="list">
      <style:paragraph-properties fo:margin-top="0cm" fo:margin-bottom="0.353cm" style:contextual-spacing="true"/>
    </style:style>
    <style:style style:name="Numbering_20_2" style:display-name="Numbering 2" style:family="paragraph" style:parent-style-name="Standard" style:list-style-name="WWNum6" style:class="list">
      <style:paragraph-properties fo:margin-top="0cm" fo:margin-bottom="0.353cm" style:contextual-spacing="true"/>
    </style:style>
    <style:style style:name="Numbering_20_3" style:display-name="Numbering 3" style:family="paragraph" style:parent-style-name="Standard" style:list-style-name="WWNum7" style:class="list">
      <style:paragraph-properties fo:margin-top="0cm" fo:margin-bottom="0.353cm" style:contextual-spacing="true"/>
    </style:style>
    <style:style style:name="List_20_1_20_Cont." style:display-name="List 1 Cont." style:family="paragraph" style:parent-style-name="Standard" style:class="list">
      <style:paragraph-properties fo:margin-left="0.635cm" fo:margin-top="0cm" fo:margin-bottom="0.212cm" style:contextual-spacing="true"/>
    </style:style>
    <style:style style:name="List_20_2_20_Cont." style:display-name="List 2 Cont." style:family="paragraph" style:parent-style-name="Standard" style:class="list">
      <style:paragraph-properties fo:margin-left="1.27cm" fo:margin-top="0cm" fo:margin-bottom="0.212cm" style:contextual-spacing="true"/>
    </style:style>
    <style:style style:name="List_20_3_20_Cont." style:display-name="List 3 Cont." style:family="paragraph" style:parent-style-name="Standard" style:class="list">
      <style:paragraph-properties fo:margin-left="1.905cm" fo:margin-top="0cm" fo:margin-bottom="0.212cm" style:contextual-spacing="true"/>
    </style:style>
    <style:style style:name="macro" style:family="paragraph" loext:linked-style-name="Macro_20_Text_20_Char">
      <style:paragraph-properties fo:margin-top="0cm" fo:margin-bottom="0.353cm" style:contextual-spacing="false" fo:line-height="115%" fo:text-align="start" style:justify-single-word="false" fo:orphans="2" fo:widows="2" style:writing-mode="lr-tb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</style:tab-stops>
      </style:paragraph-properties>
      <style:text-properties style:font-name="Courier" fo:font-family="Courier" style:font-family-generic="roman" style:font-pitch="variable" fo:font-size="10pt" style:font-size-asian="10pt" style:font-size-complex="10pt"/>
    </style:style>
    <style:style style:name="Quote" style:family="paragraph" style:parent-style-name="Standard" style:next-style-name="Standard" loext:linked-style-name="Quote_20_Char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1.651cm" fo:margin-right="1.651cm" fo:margin-top="0.353cm" fo:margin-bottom="0.494cm" style:contextual-spacing="false" fo:padding-left="0cm" fo:padding-right="0cm" fo:padding-top="0cm" fo:padding-bottom="0.141cm" fo:border-left="none" fo:border-right="none" fo:border-top="none" fo:border-bottom="0.51pt solid #4f81bd"/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/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 loext:linked-style-name="Heading_20_2"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_20_Char" style:display-name="Heading 3 Char" style:family="text" style:parent-style-name="Default_20_Paragraph_20_Font" loext:linked-style-name="Heading_20_3"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Title_20_Char" style:display-name="Title Char" style:family="text" style:parent-style-name="Default_20_Paragraph_20_Font" loext:linked-style-name="Title"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_20_Char" style:display-name="Subtitle Char" style:family="text" style:parent-style-name="Default_20_Paragraph_20_Font" loext:linked-style-name="Subtitle">
      <style:text-properties fo:color="#4f81bd" loext:opacity="100%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 loext:linked-style-name="Body_20_Text_20_2"/>
    <style:style style:name="Body_20_Text_20_3_20_Char" style:display-name="Body Text 3 Char" style:family="text" style:parent-style-name="Default_20_Paragraph_20_Font" loext:linked-style-name="Body_20_Text_20_3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 loext:linked-style-name="macro">
      <style:text-properties style:font-name="Courier" fo:font-family="Courier" style:font-family-generic="roman" style:font-pitch="variable" fo:font-size="10pt" style:font-size-asian="10pt" style:font-size-complex="10pt"/>
    </style:style>
    <style:style style:name="Quote_20_Char" style:display-name="Quote Char" style:family="text" style:parent-style-name="Default_20_Paragraph_20_Font" loext:linked-style-name="Quote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Heading_20_4_20_Char" style:display-name="Heading 4 Char" style:family="text" style:parent-style-name="Default_20_Paragraph_20_Font" loext:linked-style-name="Heading_20_4"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_20_Char" style:display-name="Heading 5 Char" style:family="text" style:parent-style-name="Default_20_Paragraph_20_Font" loext:linked-style-name="Heading_20_5"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_20_Char" style:display-name="Heading 6 Char" style:family="text" style:parent-style-name="Default_20_Paragraph_20_Font" loext:linked-style-name="Heading_20_6"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_20_Char" style:display-name="Heading 7 Char" style:family="text" style:parent-style-name="Default_20_Paragraph_20_Font" loext:linked-style-name="Heading_20_7"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_20_Char" style:display-name="Heading 8 Char" style:family="text" style:parent-style-name="Default_20_Paragraph_20_Font" loext:linked-style-name="Heading_20_8"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_20_Char" style:display-name="Heading 9 Char" style:family="text" style:parent-style-name="Default_20_Paragraph_20_Font" loext:linked-style-name="Heading_20_9"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 loext:linked-style-name="Intense_20_Quote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Emphasis" style:display-name="Subtle Emphasis" style:family="text" style:parent-style-name="Default_20_Paragraph_20_Font">
      <style:text-properties fo:color="#808080" loext:opacity="100%" fo:font-style="italic" style:font-style-asian="italic" style:font-style-complex="italic">
        <loext:char-complex-color loext:theme-type="dark1" loext:color-type="theme">
          <loext:transformation loext:type="tint" loext:value="501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Reference" style:display-name="Subtle Reference" style:family="text" style:parent-style-name="Default_20_Paragraph_20_Font">
      <style:text-properties fo:font-variant="small-caps" fo:color="#c0504d" loext:opacity="100%" style:text-underline-style="solid" style:text-underline-width="auto" style:text-underline-color="font-color">
        <loext:char-complex-color loext:theme-type="accent2" loext:color-type="theme"/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c0504d" loext:opacity="100%" fo:letter-spacing="0.009cm" style:text-underline-style="solid" style:text-underline-width="auto" style:text-underline-color="font-color" fo:font-weight="bold" style:font-weight-asian="bold" style:font-weight-complex="bold">
        <loext:char-complex-color loext:theme-type="accent2" loext:color-type="theme"/>
      </style:text-properties>
    </style:style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5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6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7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8" loext:num-list-format="%1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9" loext:num-list-format="%1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1.6cm" fo:margin-bottom="1.6cm" fo:margin-left="1.799cm" fo:margin-right="1.7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7.94cm" fo:page-height="21.59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ython-docx</meta:initial-creator>
    <dc:description>generated by python-docx</dc:description>
    <meta:editing-cycles>2</meta:editing-cycles>
    <meta:creation-date>2013-12-23T23:15:00</meta:creation-date>
    <dc:date>2026-05-08T21:27:42.047282405</dc:date>
    <meta:editing-duration>PT2M12S</meta:editing-duration>
    <meta:generator>LibreOffice/24.2.5.2$MacOSX_X86_64 LibreOffice_project/bffef4ea93e59bebbeaf7f431bb02b1a39ee8a59</meta:generator>
    <meta:document-statistic meta:table-count="0" meta:image-count="0" meta:object-count="0" meta:page-count="2" meta:paragraph-count="61" meta:word-count="631" meta:character-count="4742" meta:non-whitespace-character-count="4070"/>
    <meta:user-defined meta:name="AppVersion">14.0000</meta:user-defined>
    <meta:template xlink:type="simple" xlink:actuate="onRequest" xlink:title="Normal.dotm" xlink:href=""/>
  </office:meta>
</office:document-meta>
</file>